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7F000003F9E3E58D89.png" manifest:media-type="image/png"/>
  <manifest:file-entry manifest:full-path="Pictures/10000000000005C60000036E84F7ED9B.png" manifest:media-type="image/png"/>
  <manifest:file-entry manifest:full-path="Pictures/100000000000077F000003B4503883ED.png" manifest:media-type="image/png"/>
  <manifest:file-entry manifest:full-path="Pictures/100000000000077F000003FD26816803.png" manifest:media-type="image/png"/>
  <manifest:file-entry manifest:full-path="Pictures/1000000100000528000001F16F728852.png" manifest:media-type="image/png"/>
  <manifest:file-entry manifest:full-path="Pictures/100000000000057F0000034FC160367A.png" manifest:media-type="image/png"/>
  <manifest:file-entry manifest:full-path="Pictures/100000000000077F000003C5ADFB2CA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7e0" officeooo:paragraph-rsid="001c17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Figura1" text:anchor-type="char" svg:width="17cm" svg:height="9.008cm" draw:z-index="0"><draw:image xlink:href="Pictures/100000000000077F000003F9E3E58D89.png" xlink:type="simple" xlink:show="embed" xlink:actuate="onLoad" draw:mime-type="image/png"/></draw:frame><text:s/></text:p>
      <text:p text:style-name="Standard"/>
      <text:p text:style-name="Standard"><draw:frame draw:style-name="fr1" draw:name="Figura2" text:anchor-type="char" svg:width="17cm" svg:height="9.043cm" draw:z-index="1"><draw:image xlink:href="Pictures/100000000000077F000003FD26816803.png" xlink:type="simple" xlink:show="embed" xlink:actuate="onLoad" draw:mime-type="image/png"/></draw:frame><text:s/></text:p>
      <text:p text:style-name="Standard"><draw:frame draw:style-name="fr1" draw:name="Figura3" text:anchor-type="char" svg:width="17cm" svg:height="8.398cm" draw:z-index="2"><draw:image xlink:href="Pictures/100000000000077F000003B4503883ED.png" xlink:type="simple" xlink:show="embed" xlink:actuate="onLoad" draw:mime-type="image/png"/></draw:frame><text:soft-page-break/><text:s/></text:p>
      <text:p text:style-name="Standard"><draw:frame draw:style-name="fr2" draw:name="Figura4" text:anchor-type="char" svg:width="17cm" svg:height="8.548cm" draw:z-index="3"><draw:image xlink:href="Pictures/100000000000077F000003C5ADFB2CA0.png" xlink:type="simple" xlink:show="embed" xlink:actuate="onLoad" draw:mime-type="image/png"/></draw:frame><text:s/></text:p>
      <text:p text:style-name="P1">1.</text:p>
      <text:p text:style-name="P1">2.1 e 2.2</text:p>
      <text:p text:style-name="P1"><draw:frame draw:style-name="fr3" draw:name="Figura5" text:anchor-type="char" svg:x="0cm" svg:y="-1cm" svg:width="17cm" svg:height="10.098cm" draw:z-index="4"><draw:image xlink:href="Pictures/10000000000005C60000036E84F7ED9B.png" xlink:type="simple" xlink:show="embed" xlink:actuate="onLoad" draw:mime-type="image/png"/></draw:frame><text:soft-page-break/><text:s/></text:p>
      <text:p text:style-name="P1">2.3</text:p>
      <text:p text:style-name="P1">não consegui colocar o ip</text:p>
      <text:p text:style-name="P1"/>
      <text:p text:style-name="P1"><draw:frame draw:style-name="fr1" draw:name="Figura6" text:anchor-type="char" svg:width="17cm" svg:height="10.232cm" draw:z-index="5"><draw:image xlink:href="Pictures/100000000000057F0000034FC160367A.png" xlink:type="simple" xlink:show="embed" xlink:actuate="onLoad" draw:mime-type="image/png"/></draw:frame><text:s/></text:p>
      <text:p text:style-name="P1">Etapa 8 -</text:p>
      <text:p text:style-name="P1"/>
      <text:p text:style-name="P1"><draw:frame draw:style-name="fr1" draw:name="Figura7" text:anchor-type="char" svg:width="17cm" svg:height="6.399cm" draw:z-index="6"><draw:image xlink:href="Pictures/1000000100000528000001F16F728852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3T21:32:30.047684800</meta:creation-date>
    <dc:date>2026-06-23T21:58:21.193747900</dc:date>
    <meta:editing-duration>PT1M59S</meta:editing-duration>
    <meta:editing-cycles>1</meta:editing-cycles>
    <meta:document-statistic meta:table-count="0" meta:image-count="7" meta:object-count="0" meta:page-count="4" meta:paragraph-count="12" meta:word-count="13" meta:character-count="55" meta:non-whitespace-character-count="40"/>
    <meta:generator>LibreOffice/25.8.6.2$Windows_X86_64 LibreOffice_project/b4b39682cd9868fa725bc664aff94278d315bd04</meta:generator>
  </office:meta>
</office:document-meta>
</file>